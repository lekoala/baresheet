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11:16:24.289219700</meta:creation-date>
    <meta:editing-cycles>1</meta:editing-cycles>
    <meta:editing-duration>PT1M51S</meta:editing-duration>
    <dc:description>demo comment
demo comment line 2

demo comment with a space above</dc:description>
    <meta:keyword>demo</meta:keyword>
    <meta:keyword>key</meta:keyword>
    <meta:keyword>words</meta:keyword>
    <dc:contributor>demo contributor</dc:contributor>
    <dc:coverage>demo coverage</dc:coverage>
    <dc:identifier>demo identifier</dc:identifier>
    <dc:publisher>demo publisher</dc:publisher>
    <dc:relation>demo relation</dc:relation>
    <dc:rights>demo rights</dc:rights>
    <dc:source>demo source</dc:source>
    <dc:type>demo type</dc:type>
    <dc:subject>demo subject</dc:subject>
    <dc:title>demo title</dc:title>
    <dc:date>2026-05-22T11:18:15.047421200</dc:date>
    <meta:document-statistic meta:table-count="1" meta:cell-count="0" meta:object-count="0"/>
    <meta:generator>LibreOffice/25.8.1.1$Windows_X86_64 LibreOffice_project/54047653041915e595ad4e45cccea684809c77b5</meta:generator>
    <meta:user-defined meta:name="DemoCustom">DemoCustomValue</meta:user-defined>
  </office:meta>
</office:document-meta>
</file>